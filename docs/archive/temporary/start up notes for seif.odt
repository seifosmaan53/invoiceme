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.SF NS" svg:font-family=".SF NS"/>
    <style:font-face style:name="Helvetica Neue" svg:font-family="Helvetica Neue"/>
    <style:font-face style:name="Menlo" svg:font-family="Menlo"/>
  </office:font-face-decls>
  <office:automatic-styles>
    <style:style style:name="P1" style:family="paragraph" style:parent-style-name="Standard">
      <style:text-properties style:font-name=".SF NS" fo:font-size="16.9pt" fo:color="#cfd6e4" fo:background-color="#0a0a0a"/>
    </style:style>
    <style:style style:name="P2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Helvetica Neue" fo:font-size="13.0pt" fo:color="#cfd6e4" fo:background-color="#0a0a0a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Menlo" fo:font-size="12.0pt" fo:color="#da7cd4" fo:background-color="#0a0a0a"/>
    </style:style>
    <style:style style:name="P4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Menlo" fo:font-size="12.0pt" fo:color="#cfd6e4" fo:background-color="#0a0a0a"/>
    </style:style>
    <style:style style:name="P5" style:family="paragraph" style:parent-style-name="Standard">
      <style:text-properties style:font-name=".SF NS" fo:font-size="14.9pt" fo:color="#cfd6e4" fo:background-color="#0a0a0a"/>
    </style:style>
    <style:style style:name="P6" style:family="paragraph" style:parent-style-name="Standard">
      <style:text-properties style:font-name="Helvetica Neue" fo:font-size="13.0pt" fo:color="#cfd6e4" fo:background-color="#0a0a0a"/>
    </style:style>
    <style:style style:name="P7" style:family="paragraph" style:parent-style-name="Standard">
      <style:text-properties style:font-name="Helvetica Neue" fo:font-size="13.0pt" fo:color="#cfd6e4"/>
    </style:style>
    <style:style style:name="P8" style:family="paragraph" style:parent-style-name="Standard">
      <style:text-properties style:font-name="Menlo" fo:font-size="12.0pt" fo:color="#da7cd4" fo:background-color="#0a0a0a"/>
    </style:style>
    <style:style style:name="P9" style:family="paragraph" style:parent-style-name="Standard">
      <style:text-properties style:font-name="Helvetica Neue" fo:font-size="13.0pt" fo:color="#cfd6e4" fo:background-color="#313131"/>
    </style:style>
    <style:style style:name="P10" style:family="paragraph" style:parent-style-name="Standard">
      <style:text-properties style:font-name="Helvetica Neue" fo:font-size="13.0pt" fo:color="#ffffff" fo:background-color="#111111"/>
    </style:style>
    <style:style style:name="P11" style:family="paragraph" style:parent-style-name="Standard">
      <style:text-properties style:font-name="Helvetica Neue" fo:font-size="13.0pt" fo:color="#c1c1c1"/>
    </style:style>
    <style:style style:name="P12" style:family="paragraph" style:parent-style-name="Standard">
      <style:text-properties style:font-name="Helvetica Neue" fo:font-size="12.0pt" fo:color="#c1c1c1"/>
    </style:style>
    <style:style style:name="P13" style:family="paragraph" style:parent-style-name="Standard">
      <style:text-properties style:font-name=".SF NS" fo:font-size="14.9pt" fo:color="#cfd6e4"/>
    </style:style>
    <style:style style:name="P14" style:family="paragraph" style:parent-style-name="Standard">
      <style:text-properties style:font-name="Menlo" fo:font-size="12.0pt" fo:color="#e9a06d" fo:background-color="#0a0a0a"/>
    </style:style>
    <style:style style:name="P15" style:family="paragraph" style:parent-style-name="Standard">
      <style:text-properties style:font-name="Menlo" fo:font-size="12.0pt" fo:color="#cfd6e4"/>
    </style:style>
    <style:style style:name="P16" style:family="paragraph" style:parent-style-name="Standard">
      <style:text-properties style:font-name="Helvetica Neue" fo:font-size="13.0pt" fo:color="#6d6d6d" fo:background-color="#000000"/>
    </style:style>
    <style:style style:name="P17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Menlo" fo:font-size="11.7pt" fo:color="#cfd6e4" fo:background-color="#191919"/>
    </style:style>
    <style:style style:name="P18" style:family="paragraph" style:parent-style-name="Standard">
      <style:text-properties style:font-name="Menlo" fo:font-size="12.0pt" fo:color="#cfd6e4" fo:background-color="#0a0a0a"/>
    </style:style>
    <style:style style:name="T1" style:family="text">
      <style:text-properties fo:font-weight="bold" fo:font-weight-asian="bold" fo:font-weight-complex="bold" fo:letter-spacing="0.0000in"/>
    </style:style>
    <style:style style:name="T2" style:family="text">
      <style:text-properties fo:letter-spacing="0.0000in"/>
    </style:style>
    <style:style style:name="T3" style:family="text">
      <style:text-properties style:font-name="Helvetica Neue" fo:font-size="13.0pt" fo:font-size-asian="13.0pt" fo:font-size-complex="13.0pt" fo:color="#cfd6e4"/>
    </style:style>
    <style:style style:name="T4" style:family="text">
      <style:text-properties style:font-name="Helvetica Neue" fo:font-size="13.0pt" fo:font-size-asian="13.0pt" fo:font-size-complex="13.0pt" fo:letter-spacing="0.0000in" fo:color="#cfd6e4"/>
    </style:style>
    <style:style style:name="T5" style:family="text">
      <style:text-properties style:font-name="Helvetica Neue" fo:font-size="13.0pt" fo:font-size-asian="13.0pt" fo:font-size-complex="13.0pt" fo:letter-spacing="0.0000in" fo:color="#cfd6e4" fo:background-color="transparent"/>
    </style:style>
    <style:style style:name="T6" style:family="text">
      <style:text-properties fo:letter-spacing="0.0000in" fo:color="#e9a06d"/>
    </style:style>
    <style:style style:name="T7" style:family="text">
      <style:text-properties fo:letter-spacing="0.0000in" fo:color="#cfd6e4"/>
    </style:style>
    <style:style style:name="T8" style:family="text">
      <style:text-properties fo:letter-spacing="0.0000in" fo:color="#cfd6e4" fo:background-color="transparent"/>
    </style:style>
    <style:style style:name="T9" style:family="text">
      <style:text-properties style:font-name="Helvetica Neue" fo:font-size="13.0pt" fo:font-size-asian="13.0pt" fo:font-size-complex="13.0pt"/>
    </style:style>
    <style:style style:name="T10" style:family="text">
      <style:text-properties style:font-name="Helvetica Neue" fo:font-size="13.0pt" fo:font-size-asian="13.0pt" fo:font-size-complex="13.0pt" fo:letter-spacing="0.0000in"/>
    </style:style>
    <style:style style:name="T11" style:family="text">
      <style:text-properties style:font-name="Helvetica Neue" fo:font-size="13.0pt" fo:font-size-asian="13.0pt" fo:font-size-complex="13.0pt" fo:letter-spacing="0.0000in" fo:background-color="transparent"/>
    </style:style>
    <style:style style:name="T12" style:family="text">
      <style:text-properties fo:letter-spacing="0.0000in" fo:color="#da7cd4"/>
    </style:style>
    <style:style style:name="T13" style:family="text">
      <style:text-properties fo:letter-spacing="0.0000in" fo:background-color="transparent"/>
    </style:style>
    <style:style style:name="T14" style:family="text">
      <style:text-properties style:font-name="Menlo" fo:font-size="11.7pt" fo:font-size-asian="11.7pt" fo:font-size-complex="11.7pt" fo:letter-spacing="0.0000in" fo:color="#1f92ff" fo:background-color="#000000"/>
    </style:style>
    <style:style style:name="T15" style:family="text">
      <style:text-properties style:font-name="Menlo" fo:font-size="11.7pt" fo:font-size-asian="11.7pt" fo:font-size-complex="11.7pt" fo:letter-spacing="0.0000in" fo:background-color="#191919"/>
    </style:style>
    <style:style style:name="T16" style:family="text">
      <style:text-properties fo:letter-spacing="0.0000in" fo:color="#cdccd5"/>
    </style:style>
    <style:style style:name="T17" style:family="text">
      <style:text-properties style:font-name="Helvetica Neue" fo:font-size="13.0pt" fo:font-size-asian="13.0pt" fo:font-size-complex="13.0pt" fo:background-color="#0a0a0a"/>
    </style:style>
    <style:style style:name="T18" style:family="text">
      <style:text-properties style:font-name="Helvetica Neue" fo:font-size="13.0pt" fo:font-size-asian="13.0pt" fo:font-size-complex="13.0pt" fo:letter-spacing="0.0000in" fo:background-color="#0a0a0a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number text:level="1" style:num-format="1">
        <style:list-level-properties text:space-before="0.25in" text:min-label-width="0.25in"/>
      </text:list-level-style-number>
    </text:list-style>
    <text:list-style style:name="L2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Quick steps</text:span></text:p>
      <text:list text:style-name="L1">
        <text:list-item>
          <text:p text:style-name="P2"><text:span text:style-name="T2">Open a terminal (Terminal app on macOS).</text:span></text:p>
        </text:list-item>
      </text:list>
      <text:list text:style-name="L1">
        <text:list-item>
          <text:p text:style-name="P3"><text:span text:style-name="T3"/><text:span text:style-name="T4">Navigate to the mobile directory:<text:line-break/></text:span><text:span text:style-name="T5"><text:line-break/><text:line-break/><text:line-break/></text:span><text:span text:style-name="T6">cd</text:span><text:span text:style-name="T7"> </text:span><text:span text:style-name="T2">"/Users/seifosman/Desktop/invoice maker/mobile"</text:span><text:span text:style-name="T8"><text:line-break/><text:line-break/></text:span></text:p>
        </text:list-item>
      </text:list>
      <text:list text:style-name="L1">
        <text:list-item>
          <text:p text:style-name="P4"><text:span text:style-name="T9"/><text:span text:style-name="T10">Run the Flutter web app:<text:line-break/></text:span><text:span text:style-name="T11"><text:line-break/><text:line-break/></text:span><text:span text:style-name="T6">flutter</text:span><text:span text:style-name="T2"> </text:span><text:span text:style-name="T12">run</text:span><text:span text:style-name="T2"> </text:span><text:span text:style-name="T12">-d</text:span><text:span text:style-name="T2"> </text:span><text:span text:style-name="T12">chrome</text:span><text:span text:style-name="T2"> </text:span><text:span text:style-name="T12">--web-port=8080</text:span><text:span text:style-name="T13"><text:line-break/><text:line-break/></text:span><text:span text:style-name="T11"><text:line-break/></text:span></text:p>
        </text:list-item>
      </text:list>
      <text:p text:style-name="P5"><text:span text:style-name="T1">What happens</text:span></text:p>
      <text:list text:style-name="L2">
        <text:list-item>
          <text:p text:style-name="P2"><text:span text:style-name="T2">First run: compilation takes 30–60 seconds</text:span></text:p>
        </text:list-item>
      </text:list>
      <text:list text:style-name="L2">
        <text:list-item>
          <text:p text:style-name="P2"><text:span text:style-name="T2">Chrome opens automatically at </text:span><text:span text:style-name="T14">http://localhost:8080</text:span></text:p>
        </text:list-item>
      </text:list>
      <text:list text:style-name="L2">
        <text:list-item>
          <text:p text:style-name="P2"><text:span text:style-name="T2">If Chrome doesn't open: check the terminal for the exact URL</text:span></text:p>
        </text:list-item>
      </text:list>
      <text:p text:style-name="P5"><text:span text:style-name="T1">Alternative (if port 8080 is busy)</text:span></text:p>
      <text:p text:style-name="P6"><text:span text:style-name="T2"/></text:p>
      <text:p text:style-name="P7"><text:span text:style-name="T2"/></text:p>
      <text:p text:style-name="P7"><text:span text:style-name="T2"/></text:p>
      <text:p text:style-name="P8"><text:span text:style-name="T6">flutter</text:span><text:span text:style-name="T7"> </text:span><text:span text:style-name="T2">run</text:span><text:span text:style-name="T7"> </text:span><text:span text:style-name="T2">-d</text:span><text:span text:style-name="T7"> </text:span><text:span text:style-name="T2">chrome</text:span></text:p>
      <text:p text:style-name="P7"><text:span text:style-name="T2"/></text:p>
      <text:p text:style-name="P6"><text:span text:style-name="T2">Flutter will use a random port (e.g., </text:span><text:span text:style-name="T14">http://localhost:65102</text:span><text:span text:style-name="T2">). Check the terminal for the exact URL.</text:span></text:p>
      <text:p text:style-name="P1"><text:span text:style-name="T1">Important notes</text:span></text:p>
      <text:list text:style-name="L2">
        <text:list-item>
          <text:p text:style-name="P2"><text:span text:style-name="T2">Keep the terminal open — closing it stops the app</text:span></text:p>
        </text:list-item>
      </text:list>
      <text:list text:style-name="L2">
        <text:list-item>
          <text:p text:style-name="P2"><text:span text:style-name="T2">Wait for compilation — don't access the URL until you see "Running" in the terminal</text:span></text:p>
        </text:list-item>
      </text:list>
      <text:list text:style-name="L2">
        <text:list-item>
          <text:p text:style-name="P2"><text:span text:style-name="T2">Use the URL from the terminal — don't assume </text:span><text:span text:style-name="T15">localhost:8080</text:span><text:span text:style-name="T2"> if Flutter uses a different port</text:span></text:p>
        </text:list-item>
      </text:list>
      <text:p text:style-name="P1"><text:span text:style-name="T1">Verify it's working</text:span></text:p>
      <text:list text:style-name="L1">
        <text:list-item>
          <text:p text:style-name="P2"><text:span text:style-name="T2">Check the terminal for a "Running" message</text:span></text:p>
        </text:list-item>
      </text:list>
      <text:list text:style-name="L1">
        <text:list-item>
          <text:p text:style-name="P2"><text:span text:style-name="T2">Chrome should open automatically (or manually open the URL shown)</text:span></text:p>
        </text:list-item>
      </text:list>
      <text:list text:style-name="L1">
        <text:list-item>
          <text:p text:style-name="P2"><text:span text:style-name="T2">You should see the login/register screen</text:span></text:p>
        </text:list-item>
      </text:list>
      <text:p text:style-name="P1"><text:span text:style-name="T1">Troubleshooting</text:span></text:p>
      <text:p text:style-name="P6"><text:span text:style-name="T2">If port 8080 is already in use:</text:span></text:p>
      <text:p text:style-name="P7"><text:span text:style-name="T2"/></text:p>
      <text:p text:style-name="P8"><text:span text:style-name="T6">lsof</text:span><text:span text:style-name="T7"> </text:span><text:span text:style-name="T2">-ti</text:span><text:span text:style-name="T7"> </text:span><text:span text:style-name="T2">:8080</text:span><text:span text:style-name="T7"> </text:span><text:span text:style-name="T16">|</text:span><text:span text:style-name="T7"> </text:span><text:span text:style-name="T6">xargs</text:span><text:span text:style-name="T7"> </text:span><text:span text:style-name="T2">kill</text:span><text:span text:style-name="T7"> </text:span><text:span text:style-name="T2">-9</text:span></text:p>
      <text:p text:style-name="P8"><text:span text:style-name="T6">flutter</text:span><text:span text:style-name="T7"> </text:span><text:span text:style-name="T2">run</text:span><text:span text:style-name="T7"> </text:span><text:span text:style-name="T2">-d</text:span><text:span text:style-name="T7"> </text:span><text:span text:style-name="T2">chrome</text:span><text:span text:style-name="T7"> </text:span><text:span text:style-name="T2">--web-port=8080</text:span></text:p>
      <text:p text:style-name="P9"><text:span text:style-name="T2"/></text:p>
      <text:p text:style-name="P7"><text:span text:style-name="T2"/></text:p>
      <text:p text:style-name="P6"><text:span text:style-name="T2">If you see connection errors, make sure the backend is running on port 3000 first.</text:span></text:p>
      <text:p text:style-name="P6"><text:span text:style-name="T2">The web app should open in Chrome and show the login screen.</text:span></text:p>
      <text:p text:style-name="P10"><text:span text:style-name="T2">and what about to open the regular mobile simulator </text:span></text:p>
      <text:p text:style-name="P11"><text:span text:style-name="T2"/></text:p>
      <text:p text:style-name="P6"><text:span text:style-name="T2">Checking documentation for mobile simulator setup:</text:span></text:p>
      <text:p text:style-name="P12"><text:span text:style-name="T2"/></text:p>
      <text:p text:style-name="P6"><text:span text:style-name="T2">Here’s how to open the mobile simulator (iOS or Android):</text:span></text:p>
      <text:p text:style-name="P1"><text:span text:style-name="T1">iOS Simulator (macOS)</text:span></text:p>
      <text:p text:style-name="P5"><text:span text:style-name="T1">Step 1: Check available devices</text:span></text:p>
      <text:p text:style-name="P13"><text:span text:style-name="T1"/></text:p>
      <text:p text:style-name="P13"><text:span text:style-name="T1"/></text:p>
      <text:p text:style-name="P8"><text:span text:style-name="T6">cd</text:span><text:span text:style-name="T7"> </text:span><text:span text:style-name="T2">"/Users/seifosman/Desktop/invoice maker/mobile"</text:span></text:p>
      <text:p text:style-name="P14"><text:span text:style-name="T2">flutter</text:span><text:span text:style-name="T7"> </text:span><text:span text:style-name="T12">devices</text:span></text:p>
      <text:p text:style-name="P13"><text:span text:style-name="T1"/></text:p>
      <text:p text:style-name="P13"><text:span text:style-name="T1"/></text:p>
      <text:p text:style-name="P6"><text:span text:style-name="T2">This lists available simulators and devices.</text:span></text:p>
      <text:p text:style-name="P5"><text:span text:style-name="T1">Step 2: Run on iOS Simulator</text:span></text:p>
      <text:p text:style-name="P13"><text:span text:style-name="T1"/></text:p>
      <text:p text:style-name="P8"><text:span text:style-name="T6">flutter</text:span><text:span text:style-name="T7"> </text:span><text:span text:style-name="T2">run</text:span><text:span text:style-name="T7"> </text:span><text:span text:style-name="T2">-d</text:span><text:span text:style-name="T7"> </text:span><text:span text:style-name="T2">ios</text:span></text:p>
      <text:p text:style-name="P13"><text:span text:style-name="T1"/></text:p>
      <text:p text:style-name="P13"><text:span text:style-name="T1"/></text:p>
      <text:p text:style-name="P6"><text:span text:style-name="T2">Or specify a device:</text:span></text:p>
      <text:p text:style-name="P15"><text:span text:style-name="T2"/></text:p>
      <text:p text:style-name="P7"><text:span text:style-name="T2"/></text:p>
      <text:p text:style-name="P8"><text:span text:style-name="T6">flutter</text:span><text:span text:style-name="T7"> </text:span><text:span text:style-name="T2">run</text:span><text:span text:style-name="T7"> </text:span><text:span text:style-name="T2">-d</text:span><text:span text:style-name="T7"> </text:span><text:span text:style-name="T2">"iPhone 15 Pro"</text:span></text:p>
      <text:p text:style-name="P7"><text:span text:style-name="T2"/></text:p>
      <text:p text:style-name="P7"><text:span text:style-name="T2"/></text:p>
      <text:p text:style-name="P5"><text:span text:style-name="T1">If iOS Simulator isn't available</text:span></text:p>
      <text:list text:style-name="L1">
        <text:list-item>
          <text:p text:style-name="P2"><text:span text:style-name="T2">Install Xcode (if not installed):</text:span></text:p>
        </text:list-item>
      </text:list>
      <text:list text:style-name="L2">
        <text:list-item>
          <text:p text:style-name="P2"><text:span text:style-name="T2">App Store → search "Xcode" → Install</text:span></text:p>
        </text:list-item>
      </text:list>
      <text:list text:style-name="L2">
        <text:list-item>
          <text:p text:style-name="P2"><text:span text:style-name="T2">Or download from: https://developer.apple.com/xcode/</text:span></text:p>
        </text:list-item>
      </text:list>
      <text:list text:style-name="L1">
        <text:list-item>
          <text:p text:style-name="P3"><text:span text:style-name="T3"/><text:span text:style-name="T4">Set up Xcode:<text:line-break/></text:span><text:span text:style-name="T5"><text:line-break/><text:line-break/></text:span><text:span text:style-name="T7">   </text:span><text:span text:style-name="T6">sudo</text:span><text:span text:style-name="T7"> </text:span><text:span text:style-name="T2">xcode-select</text:span><text:span text:style-name="T7"> </text:span><text:span text:style-name="T2">--switch</text:span><text:span text:style-name="T7"> </text:span><text:span text:style-name="T2">/Applications/Xcode.app/Contents/Developer</text:span><text:span text:style-name="T8"><text:line-break/><text:line-break/></text:span><text:span text:style-name="T7">   </text:span><text:span text:style-name="T6">sudo</text:span><text:span text:style-name="T7"> </text:span><text:span text:style-name="T2">xcodebuild</text:span><text:span text:style-name="T7"> </text:span><text:span text:style-name="T2">-runFirstLaunch</text:span><text:span text:style-name="T8"><text:line-break/></text:span><text:span text:style-name="T4"><text:line-break/></text:span><text:span text:style-name="T5"><text:line-break/></text:span></text:p>
        </text:list-item>
      </text:list>
      <text:list text:style-name="L1">
        <text:list-item>
          <text:p text:style-name="P4"><text:span text:style-name="T9"/><text:span text:style-name="T10">Install CocoaPods:<text:line-break/></text:span><text:span text:style-name="T11"><text:line-break/></text:span><text:span text:style-name="T2">   </text:span><text:span text:style-name="T6">sudo</text:span><text:span text:style-name="T2"> </text:span><text:span text:style-name="T12">gem</text:span><text:span text:style-name="T2"> </text:span><text:span text:style-name="T12">install</text:span><text:span text:style-name="T2"> </text:span><text:span text:style-name="T12">cocoapods</text:span><text:span text:style-name="T13"><text:line-break/></text:span><text:span text:style-name="T11"><text:line-break/></text:span></text:p>
        </text:list-item>
      </text:list>
      <text:list text:style-name="L1">
        <text:list-item>
          <text:p text:style-name="P3"><text:span text:style-name="T3"/><text:span text:style-name="T4">Install iOS dependencies:<text:line-break/></text:span><text:span text:style-name="T5"><text:line-break/></text:span><text:span text:style-name="T7">   </text:span><text:span text:style-name="T6">cd</text:span><text:span text:style-name="T7"> </text:span><text:span text:style-name="T2">"/Users/seifosman/Desktop/invoice maker/mobile/ios"</text:span><text:span text:style-name="T8"><text:line-break/><text:line-break/></text:span><text:span text:style-name="T7">   </text:span><text:span text:style-name="T6">pod</text:span><text:span text:style-name="T7"> </text:span><text:span text:style-name="T2">install</text:span><text:span text:style-name="T8"><text:line-break/><text:line-break/></text:span><text:span text:style-name="T7">   </text:span><text:span text:style-name="T6">cd</text:span><text:span text:style-name="T7"> </text:span><text:span text:style-name="T2">..</text:span><text:span text:style-name="T8"><text:line-break/></text:span><text:span text:style-name="T5"><text:line-break/></text:span></text:p>
        </text:list-item>
      </text:list>
      <text:list text:style-name="L1">
        <text:list-item>
          <text:p text:style-name="P4"><text:span text:style-name="T9"/><text:span text:style-name="T10">Then run:<text:line-break/></text:span><text:span text:style-name="T11"><text:line-break/><text:line-break/></text:span><text:span text:style-name="T2">   </text:span><text:span text:style-name="T6">flutter</text:span><text:span text:style-name="T2"> </text:span><text:span text:style-name="T12">run</text:span><text:span text:style-name="T2"> </text:span><text:span text:style-name="T12">-d</text:span><text:span text:style-name="T2"> </text:span><text:span text:style-name="T12">ios</text:span><text:span text:style-name="T13"><text:line-break/></text:span></text:p>
        </text:list-item>
      </text:list>
      <text:p text:style-name="P16"><text:span text:style-name="T2"/></text:p>
      <text:p text:style-name="P1"><text:span text:style-name="T1">Android Emulator</text:span></text:p>
      <text:p text:style-name="P5"><text:span text:style-name="T1">Step 1: Check available devices</text:span></text:p>
      <text:p text:style-name="P13"><text:span text:style-name="T1"/></text:p>
      <text:p text:style-name="P13"><text:span text:style-name="T1"/></text:p>
      <text:p text:style-name="P8"><text:span text:style-name="T6">cd</text:span><text:span text:style-name="T7"> </text:span><text:span text:style-name="T2">"/Users/seifosman/Desktop/invoice maker/mobile"</text:span></text:p>
      <text:p text:style-name="P14"><text:span text:style-name="T2">flutter</text:span><text:span text:style-name="T7"> </text:span><text:span text:style-name="T12">devices</text:span></text:p>
      <text:p text:style-name="P13"><text:span text:style-name="T1"/></text:p>
      <text:p text:style-name="P13"><text:span text:style-name="T1"/></text:p>
      <text:p text:style-name="P5"><text:span text:style-name="T1">Step 2: Run on Android Emulator</text:span></text:p>
      <text:p text:style-name="P13"><text:span text:style-name="T1"/></text:p>
      <text:p text:style-name="P8"><text:span text:style-name="T6">flutter</text:span><text:span text:style-name="T7"> </text:span><text:span text:style-name="T2">run</text:span><text:span text:style-name="T7"> </text:span><text:span text:style-name="T2">-d</text:span><text:span text:style-name="T7"> </text:span><text:span text:style-name="T2">android</text:span></text:p>
      <text:p text:style-name="P13"><text:span text:style-name="T1"/></text:p>
      <text:p text:style-name="P13"><text:span text:style-name="T1"/></text:p>
      <text:p text:style-name="P5"><text:span text:style-name="T1">If Android Emulator isn't available</text:span></text:p>
      <text:list text:style-name="L1">
        <text:list-item>
          <text:p text:style-name="P2"><text:span text:style-name="T2">Install Android Studio:</text:span></text:p>
        </text:list-item>
      </text:list>
      <text:list text:style-name="L2">
        <text:list-item>
          <text:p text:style-name="P2"><text:span text:style-name="T2">Download from: https://developer.android.com/studio</text:span></text:p>
        </text:list-item>
      </text:list>
      <text:list text:style-name="L2">
        <text:list-item>
          <text:p text:style-name="P2"><text:span text:style-name="T2">Install Android Studio</text:span></text:p>
        </text:list-item>
      </text:list>
      <text:list text:style-name="L1">
        <text:list-item>
          <text:p text:style-name="P2"><text:span text:style-name="T2">Set up Android Emulator:</text:span></text:p>
        </text:list-item>
      </text:list>
      <text:list text:style-name="L2">
        <text:list-item>
          <text:p text:style-name="P2"><text:span text:style-name="T2">Open Android Studio</text:span></text:p>
        </text:list-item>
      </text:list>
      <text:list text:style-name="L2">
        <text:list-item>
          <text:p text:style-name="P2"><text:span text:style-name="T2">Tools → Device Manager</text:span></text:p>
        </text:list-item>
      </text:list>
      <text:list text:style-name="L2">
        <text:list-item>
          <text:p text:style-name="P2"><text:span text:style-name="T2">Create Virtual Device → Choose a device → Download system image → Finish</text:span></text:p>
        </text:list-item>
      </text:list>
      <text:list text:style-name="L1">
        <text:list-item>
          <text:p text:style-name="P2"><text:span text:style-name="T2">Start the emulator:</text:span></text:p>
        </text:list-item>
      </text:list>
      <text:list text:style-name="L2">
        <text:list-item>
          <text:p text:style-name="P2"><text:span text:style-name="T2">In Android Studio: Device Manager → Click ▶️ next to your device</text:span></text:p>
        </text:list-item>
      </text:list>
      <text:list text:style-name="L2">
        <text:list-item>
          <text:p text:style-name="P17"><text:span text:style-name="T17"/><text:span text:style-name="T18">Or from terminal: </text:span><text:span text:style-name="T2">emulator -avd &lt;device-name&gt;</text:span></text:p>
        </text:list-item>
      </text:list>
      <text:list text:style-name="L1">
        <text:list-item>
          <text:p text:style-name="P4"><text:span text:style-name="T9"/><text:span text:style-name="T10">Then run Flutter:<text:line-break/></text:span><text:span text:style-name="T11"><text:line-break/><text:line-break/><text:line-break/></text:span><text:span text:style-name="T2">   </text:span><text:span text:style-name="T6">flutter</text:span><text:span text:style-name="T2"> </text:span><text:span text:style-name="T12">run</text:span><text:span text:style-name="T2"> </text:span><text:span text:style-name="T12">-d</text:span><text:span text:style-name="T2"> </text:span><text:span text:style-name="T12">android</text:span><text:span text:style-name="T13"><text:line-break/><text:line-break/></text:span></text:p>
        </text:list-item>
      </text:list>
      <text:p text:style-name="P16"><text:span text:style-name="T2"/></text:p>
      <text:p text:style-name="P1"><text:span text:style-name="T1">Quick way: Let Flutter choose</text:span></text:p>
      <text:p text:style-name="P7"><text:span text:style-name="T2"/></text:p>
      <text:p text:style-name="P7"><text:span text:style-name="T2"/></text:p>
      <text:p text:style-name="P8"><text:span text:style-name="T6">cd</text:span><text:span text:style-name="T7"> </text:span><text:span text:style-name="T2">"/Users/seifosman/Desktop/invoice maker/mobile"</text:span></text:p>
      <text:p text:style-name="P14"><text:span text:style-name="T2">flutter</text:span><text:span text:style-name="T7"> </text:span><text:span text:style-name="T12">run</text:span></text:p>
      <text:p text:style-name="P7"><text:span text:style-name="T2"/></text:p>
      <text:p text:style-name="P7"><text:span text:style-name="T2"/></text:p>
      <text:p text:style-name="P6"><text:span text:style-name="T2">Flutter will prompt you to choose:</text:span></text:p>
      <text:list text:style-name="L2">
        <text:list-item>
          <text:p text:style-name="P2"><text:span text:style-name="T2">Press </text:span><text:span text:style-name="T15">c</text:span><text:span text:style-name="T2"> for Chrome (web)</text:span></text:p>
        </text:list-item>
      </text:list>
      <text:list text:style-name="L2">
        <text:list-item>
          <text:p text:style-name="P2"><text:span text:style-name="T2">Press </text:span><text:span text:style-name="T15">i</text:span><text:span text:style-name="T2"> for iOS simulator</text:span></text:p>
        </text:list-item>
      </text:list>
      <text:list text:style-name="L2">
        <text:list-item>
          <text:p text:style-name="P2"><text:span text:style-name="T2">Press </text:span><text:span text:style-name="T15">a</text:span><text:span text:style-name="T2"> for Android emulator</text:span></text:p>
        </text:list-item>
      </text:list>
      <text:list text:style-name="L2">
        <text:list-item>
          <text:p text:style-name="P2"><text:span text:style-name="T2">Or select a connected physical device</text:span></text:p>
        </text:list-item>
      </text:list>
      <text:p text:style-name="P16"><text:span text:style-name="T2"/></text:p>
      <text:p text:style-name="P1"><text:span text:style-name="T1">Check what's available</text:span></text:p>
      <text:p text:style-name="P7"><text:span text:style-name="T2"/></text:p>
      <text:p text:style-name="P14"><text:span text:style-name="T2">flutter</text:span><text:span text:style-name="T7"> </text:span><text:span text:style-name="T12">devices</text:span></text:p>
      <text:p text:style-name="P7"><text:span text:style-name="T2"/></text:p>
      <text:p text:style-name="P7"><text:span text:style-name="T2"/></text:p>
      <text:p text:style-name="P6"><text:span text:style-name="T2">Example output:</text:span></text:p>
      <text:p text:style-name="P7"><text:span text:style-name="T2"/></text:p>
      <text:p text:style-name="P18"><text:span text:style-name="T2">iPhone 15 Pro (mobile) • 12345678-1234-1234-1234-123456789012 • ios • com.apple.CoreSimulator.SimRuntime.iOS-17-0</text:span></text:p>
      <text:p text:style-name="P18"><text:span text:style-name="T2">Chrome (web)           • chrome                                • web-javascript • Google Chrome</text:span></text:p>
      <text:p text:style-name="P18"><text:span text:style-name="T2">macOS (desktop)        • macos                                 • darwin         • macOS</text:span></text:p>
      <text:p text:style-name="P7"><text:span text:style-name="T2"/></text:p>
      <text:p text:style-name="P7"><text:span text:style-name="T2"/></text:p>
      <text:p text:style-name="P16"><text:span text:style-name="T2"/></text:p>
      <text:p text:style-name="P1"><text:span text:style-name="T1">Important notes</text:span></text:p>
      <text:list text:style-name="L2">
        <text:list-item>
          <text:p text:style-name="P2"><text:span text:style-name="T2">Backend must be running: The mobile app needs the backend API on </text:span><text:span text:style-name="T14">http://localhost:3000</text:span></text:p>
        </text:list-item>
      </text:list>
      <text:list text:style-name="L2">
        <text:list-item>
          <text:p text:style-name="P2"><text:span text:style-name="T2">iOS Simulator: Uses </text:span><text:span text:style-name="T14">http://localhost:3000/api/v1</text:span><text:span text:style-name="T2"> (same as web)</text:span></text:p>
        </text:list-item>
      </text:list>
      <text:list text:style-name="L2">
        <text:list-item>
          <text:p text:style-name="P2"><text:span text:style-name="T2">Android Emulator: Uses </text:span><text:span text:style-name="T14">http://10.0.2.2:3000/api/v1</text:span><text:span text:style-name="T2"> (special address for Android emulator)</text:span></text:p>
        </text:list-item>
      </text:list>
      <text:p text:style-name="P16"><text:span text:style-name="T2"/></text:p>
      <text:p text:style-name="P1"><text:span text:style-name="T1">Recommendation</text:span></text:p>
      <text:list text:style-name="L2">
        <text:list-item>
          <text:p text:style-name="P2"><text:span text:style-name="T2">Fastest: Use Chrome web (</text:span><text:span text:style-name="T15">flutter run -d chrome</text:span><text:span text:style-name="T2">) — already working</text:span></text:p>
        </text:list-item>
      </text:list>
      <text:list text:style-name="L2">
        <text:list-item>
          <text:p text:style-name="P2"><text:span text:style-name="T2">iOS: Set up Xcode if you want to test iOS-specific features</text:span></text:p>
        </text:list-item>
      </text:list>
      <text:list text:style-name="L2">
        <text:list-item>
          <text:p text:style-name="P2"><text:span text:style-name="T2">Android: Set up Android Studio if you want to test Android-specific features</text:span></text:p>
        </text:list-item>
      </text:list>
      <text:p text:style-name="P6"><text:span text:style-name="T2">The web version works well for most testing, and you can switch to mobile simulators when need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685.2</meta:generator>
  </office:meta>
</office:document-meta>
</file>